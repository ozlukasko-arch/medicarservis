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 fo:font-weight="bold"/>
    </style:style>
    <style:style style:name="P2" style:family="paragraph" style:parent-style-name="Text_20_body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3" style:family="paragraph" style:parent-style-name="Heading_20_3">
      <style:paragraph-properties fo:margin-left="0cm" fo:margin-right="0cm" fo:margin-top="0cm" fo:margin-bottom="0.212cm" fo:line-height="114%" fo:orphans="2" fo:widows="2" fo:text-indent="0cm" style:auto-text-indent="false" fo:padding="0cm" fo:border="none"/>
      <style:text-properties fo:color="#1f1f1f" style:font-name="Google Sans"/>
    </style:style>
    <style:style style:name="P4" style:family="paragraph" style:parent-style-name="Horizontal_20_Line" style:list-style-name="L4">
      <style:paragraph-properties fo:margin-left="2.058cm" fo:margin-right="2.058cm" fo:margin-top="0cm" fo:margin-bottom="0.423cm" fo:line-height="114%" fo:orphans="2" fo:widows="2" fo:text-indent="0cm" style:auto-text-indent="false" fo:padding="0cm" fo:border="none"/>
    </style:style>
    <style:style style:name="P5" style:family="paragraph" style:parent-style-name="Quotations" style:list-style-name="L4">
      <style:paragraph-properties fo:margin-left="2.058cm" fo:margin-right="2.058cm" fo:margin-top="0cm" fo:margin-bottom="0cm" fo:line-height="114%" fo:orphans="2" fo:widows="2" fo:text-indent="0cm" style:auto-text-indent="false" fo:padding="0cm" fo:border="none"/>
      <style:text-properties fo:color="#1f1f1f" style:font-name="Google Sans Text" fo:font-weight="bold"/>
    </style:style>
    <style:style style:name="P6" style:family="paragraph" style:parent-style-name="Quotations" style:list-style-name="L4">
      <style:paragraph-properties fo:margin-left="2.058cm" fo:margin-right="2.058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7" style:family="paragraph" style:parent-style-name="Quotations" style:list-style-name="L4">
      <style:paragraph-properties fo:margin-left="2.058cm" fo:margin-right="2.058cm" fo:margin-top="0cm" fo:margin-bottom="0cm" fo:line-height="114%" fo:orphans="2" fo:widows="2" fo:text-indent="0cm" style:auto-text-indent="false" fo:padding="0cm" fo:border="none"/>
      <style:text-properties fo:color="#1f1f1f" style:font-name="Google Sans Text" fo:font-style="italic"/>
    </style:style>
    <style:style style:name="P8" style:family="paragraph" style:parent-style-name="Quotations" style:list-style-name="L4">
      <style:paragraph-properties fo:margin-left="2.058cm" fo:margin-right="2.058cm" fo:margin-top="0cm" fo:margin-bottom="0.265cm" fo:line-height="114%" fo:orphans="2" fo:widows="2" fo:text-indent="0cm" style:auto-text-indent="false" fo:padding="0cm" fo:border="none"/>
      <style:text-properties fo:color="#1f1f1f" style:font-name="Google Sans Text"/>
    </style:style>
    <style:style style:name="P9" style:family="paragraph" style:parent-style-name="Quotations" style:list-style-name="L4">
      <style:paragraph-properties fo:margin-left="2.058cm" fo:margin-right="2.058cm" fo:margin-top="0cm" fo:margin-bottom="0.265cm" fo:line-height="114%" fo:orphans="2" fo:widows="2" fo:text-indent="0cm" style:auto-text-indent="false" fo:padding="0cm" fo:border="none"/>
      <style:text-properties fo:color="#1f1f1f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15" style:family="paragraph" style:parent-style-name="Text_20_body" style:list-style-name="L2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16" style:family="paragraph" style:parent-style-name="Text_20_body" style:list-style-name="L3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17" style:family="paragraph" style:parent-style-name="Text_20_body" style:list-style-name="L4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18" style:family="paragraph" style:parent-style-name="Text_20_body" style:list-style-name="L5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19" style:family="paragraph" style:parent-style-name="Text_20_body" style:list-style-name="L4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 fo:font-weight="bold"/>
    </style:style>
    <style:style style:name="P20" style:family="paragraph" style:parent-style-name="Text_20_body" style:list-style-name="L5">
      <style:paragraph-properties fo:margin-left="0cm" fo:margin-right="0cm" fo:margin-top="0cm" fo:margin-bottom="0.265cm" fo:line-height="114%" fo:orphans="2" fo:widows="2" fo:text-indent="0cm" style:auto-text-indent="false" fo:padding="0cm" fo:border="none"/>
      <style:text-properties fo:color="#1f1f1f" style:font-name="Google Sans Text"/>
    </style:style>
    <style:style style:name="P21" style:family="paragraph" style:parent-style-name="Text_20_body">
      <style:paragraph-properties fo:margin-left="0cm" fo:margin-right="0cm" fo:margin-top="0cm" fo:margin-bottom="0.265cm" fo:line-height="114%" fo:orphans="2" fo:widows="2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ávod na nastavenie reklamy (Košice - Autoservis)</text:p>
      <text:p text:style-name="Text_20_body">Otvorte v prehliadači Facebook.com na počítači.</text:p>
      <text:p text:style-name="Text_20_body">Vľavo v menu kliknite na Všetko zobraziť (9 bodiek) a vyberte Správca reklám (Ads Manager). Ak ho nevidíte, kliknite na „Meta Business Suite“ a tam v menu „Všetky nástroje“ vyberte „Správca reklám“.</text:p>
      <text:list xml:id="list1637176644345367799" text:style-name="L7">
        <text:list-item>
          <text:p text:style-name="P10">Vytvorenie kampane: </text:p>
        </text:list-item>
      </text:list>
      <text:p text:style-name="Text_20_body">Kliknite na zelené tlačidlo + Vytvoriť.</text:p>
      <text:p text:style-name="Text_20_body">Zvoľte cieľ Interakcie (Engagement) – to zaistí, aby vám ľudia písali priamo do Messengera.</text:p>
      <text:p text:style-name="Text_20_body">Kliknite na Pokračovať a zvoľte Manuálne nastavenie.</text:p>
      <text:list xml:id="list4303503244799790744" text:style-name="L8">
        <text:list-item>
          <text:p text:style-name="P11">Nastavenie rozpočtu a cielenia (Sada reklám): </text:p>
        </text:list-item>
      </text:list>
      <text:p text:style-name="Text_20_body">Konverzia: Musí byť vybraté „Aplikácie na zasielanie správ“.</text:p>
      <text:p text:style-name="Text_20_body">Rozpočet: Nastavte „Denný rozpočet“ na 2 € (najnižšia funkčná suma).</text:p>
      <text:p text:style-name="Text_20_body">Lokalita: Kliknite na „Upraviť“, napíšte Košice, vyberte mesto a nastavte okruh na 17 km (aby ste zasiahli aj okolie, ktoré do KE dochádza).</text:p>
      <text:p text:style-name="Text_20_body">Vek a pohlavie: Nastavte vek 18 – 65+ a pohlavie Muži.</text:p>
      <text:p text:style-name="Text_20_body">Umiestnenia: Nechajte „Advantage+“ (Facebook sám zistí, kde je reklama najlacnejšia).</text:p>
      <text:list xml:id="list2043697993207694333" text:style-name="L9">
        <text:list-item>
          <text:p text:style-name="P12">Vytvorenie reklamy a textu (Reklama): </text:p>
        </text:list-item>
      </text:list>
      <text:p text:style-name="Text_20_body">Médiá: Nahrajte fotku svojho servisu alebo stroja na plnenie klímy. Ideálne je, ak je na fotke vidieť vaše logo alebo budovu.</text:p>
      <text:p text:style-name="Text_20_body">Primárny text (vložte tento text):</text:p>
      <text:p text:style-name="Text_20_body">CHLADÍ VAŠE AUTO DOSŤ? ❄️</text:p>
      <text:p text:style-name="Text_20_body">Neriskujte horúčavy v košických zápchach! Pripravte svoju klimatizáciu na sezónu u nás.</text:p>
      <text:p text:style-name="Text_20_body">AKTUÁLNA PONUKA: Kompletný servis klimatizácie už od 19 €! *</text:p>
      <text:p text:style-name="Text_20_body">✅ Odsatie starého chladiva a oleja ✅ Vákuovanie a test tesnosti systému ✅ Dezinfekcia ozónom pre čistý vzduch ✅ Doplnenie chladiva a nového oleja s UV farbivom ✅ Kontrola peľového filtra</text:p>
      <text:p text:style-name="Text_20_body">? Nájdete nás v Košiciach na ulici: [DOPLŇ SVOJU ULICU] ? Máme ešte voľné termíny na tento týždeň!</text:p>
      <text:p text:style-name="Text_20_body">Kliknite na "Poslať správu" nižšie a rezervujte si čas, kým je voľno.</text:p>
      <text:p text:style-name="Text_20_body">(Cena 19 € zahŕňa prácu a základnú diagnostiku, výsledná suma závisí od množstva doplneného chladiva podľa typu vozidla a typu chladiva R134a/R1234yf.)</text:p>
      <text:p text:style-name="Text_20_body">Nadpis pod obrázkom: Napíšte: Servis klímy v KE od 19 € – voľné termíny!</text:p>
      <text:p text:style-name="Text_20_body">Tlačidlo (Výzva k akcii): Vyberte Poslať správu.</text:p>
      <text:list xml:id="list8079423311603676059" text:style-name="L10">
        <text:list-item>
          <text:p text:style-name="P13">Spustenie: </text:p>
        </text:list-item>
      </text:list>
      <text:p text:style-name="Text_20_body">Skontrolujte vpravo náhľad, ako to vyzerá na mobile.</text:p>
      <text:p text:style-name="Text_20_body">Kliknite na zelené tlačidlo Zverejniť vpravo dole. Ak nemáte pridanú kartu, Facebook vás teraz vyzve na jej zadanie.</text:p>
      <text:p text:style-name="Text_20_body">Dôležité po spustení: Reklama sa najprv „schvaľuje“ (trvá to pár hodín). Akonáhle vám príde prvá správa, odpovedajte čo najrýchlejšie – zákazník, ktorý chce plniť klímu za nízku cenu, sa zvyčajne objedná tam, kde mu odpíšu ako prvé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4</meta:editing-cycles>
    <meta:generator>OpenOffice/4.1.16$Win32 OpenOffice.org_project/4116m3$Build-9816</meta:generator>
    <dc:date>2026-04-28T10:20:38.69</dc:date>
    <meta:document-statistic meta:table-count="0" meta:image-count="0" meta:object-count="0" meta:page-count="1" meta:paragraph-count="29" meta:word-count="372" meta:character-count="2363"/>
    <meta:user-defined meta:name="Info 1"/>
    <meta:user-defined meta:name="Info 2"/>
    <meta:user-defined meta:name="Info 3"/>
    <meta:user-defined meta:name="Info 4"/>
  </office:meta>
</office:document-meta>
</file>